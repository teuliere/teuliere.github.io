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P31" style:parent-style-name="Normal" style:list-style-name="LFO4" style:family="paragraph"/>
    <style:style style:name="P32" style:parent-style-name="Normal" style:list-style-name="LFO4" style:family="paragraph"/>
    <style:style style:name="P33" style:parent-style-name="Normal" style:list-style-name="LFO4" style:family="paragraph"/>
    <style:style style:name="P34" style:parent-style-name="Normal" style:list-style-name="LFO4" style:family="paragraph"/>
    <style:style style:name="P35" style:parent-style-name="Normal" style:list-style-name="LFO4" style:family="paragraph"/>
    <style:style style:name="P36" style:parent-style-name="Normal" style:list-style-name="LFO4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P39" style:parent-style-name="Normal" style:list-style-name="LFO4" style:family="paragraph"/>
    <style:style style:name="P40" style:parent-style-name="Normal" style:list-style-name="LFO4" style:family="paragraph"/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list-style-name="LFO5" style:family="paragraph"/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list-style-name="LFO5" style:family="paragraph"/>
    <style:style style:name="P45" style:parent-style-name="Normal" style:list-style-name="LFO5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list-style-name="LFO6" style:family="paragraph"/>
    <style:style style:name="P49" style:parent-style-name="Normal" style:list-style-name="LFO6" style:family="paragraph"/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list-style-name="LFO7" style:family="paragraph"/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Normal" style:list-style-name="LFO7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56" style:parent-style-name="Normal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58" style:parent-style-name="Normal" style:list-style-name="LFO8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59" style:parent-style-name="Normal" style:list-style-name="LFO8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60" style:parent-style-name="Normal" style:list-style-name="LFO8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61" style:parent-style-name="Normal" style:list-style-name="LFO8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63" style:parent-style-name="Normal" style:list-style-name="LFO9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64" style:parent-style-name="Normal" style:list-style-name="LFO9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65" style:parent-style-name="Normal" style:list-style-name="LFO9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66" style:parent-style-name="Normal" style:list-style-name="LFO9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68" style:parent-style-name="Normal" style:list-style-name="LFO10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69" style:parent-style-name="Normal" style:list-style-name="LFO10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70" style:parent-style-name="Normal" style:list-style-name="LFO10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71" style:parent-style-name="Normal" style:list-style-name="LFO10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72" style:parent-style-name="Normal" style:list-style-name="LFO10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73" style:parent-style-name="Normal" style:list-style-name="LFO10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75" style:parent-style-name="Normal" style:list-style-name="LFO11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76" style:parent-style-name="Normal" style:list-style-name="LFO11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77" style:parent-style-name="Normal" style:list-style-name="LFO11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78" style:parent-style-name="Normal" style:list-style-name="LFO11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79" style:parent-style-name="Normal" style:list-style-name="LFO11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81" style:parent-style-name="Normal" style:list-style-name="LFO12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82" style:parent-style-name="Normal" style:list-style-name="LFO12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83" style:parent-style-name="Normal" style:list-style-name="LFO12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85" style:parent-style-name="Normal" style:list-style-name="LFO13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86" style:parent-style-name="Normal" style:list-style-name="LFO13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87" style:parent-style-name="Normal" style:list-style-name="LFO13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88" style:parent-style-name="Normal" style:list-style-name="LFO13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90" style:parent-style-name="Normal" style:list-style-name="LFO14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91" style:parent-style-name="Normal" style:list-style-name="LFO14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92" style:parent-style-name="Normal" style:list-style-name="LFO14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93" style:parent-style-name="Normal" style:list-style-name="LFO14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95" style:parent-style-name="Normal" style:list-style-name="LFO15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96" style:parent-style-name="Normal" style:list-style-name="LFO15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97" style:parent-style-name="Normal" style:list-style-name="LFO15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98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99" style:parent-style-name="Normal" style:list-style-name="LFO16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00" style:parent-style-name="Normal" style:list-style-name="LFO16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01" style:parent-style-name="Normal" style:list-style-name="LFO16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02" style:parent-style-name="Normal" style:list-style-name="LFO16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03" style:parent-style-name="Normal" style:family="paragraph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105" style:parent-style-name="Policepardéfaut" style:family="text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T106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107" style:parent-style-name="Policepardéfaut" style:family="text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08" style:parent-style-name="Normal" style:list-style-name="LFO17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09" style:parent-style-name="Normal" style:list-style-name="LFO17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10" style:parent-style-name="Normal" style:list-style-name="LFO17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11" style:parent-style-name="Normal" style:list-style-name="LFO17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12" style:parent-style-name="Normal" style:list-style-name="LFO17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13" style:parent-style-name="Normal" style:list-style-name="LFO17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14" style:parent-style-name="Normal" style:list-style-name="LFO17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15" style:parent-style-name="Normal" style:list-style-name="LFO17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16" style:parent-style-name="Normal" style:list-style-name="LFO17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17" style:parent-style-name="Normal" style:family="paragraph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P119" style:parent-style-name="Normal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20" style:parent-style-name="Normal" style:list-style-name="LFO18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21" style:parent-style-name="Normal" style:list-style-name="LFO18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22" style:parent-style-name="Normal" style:list-style-name="LFO18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23" style:parent-style-name="Normal" style:list-style-name="LFO18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24" style:parent-style-name="Normal" style:list-style-name="LFO18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  <style:style style:name="P125" style:parent-style-name="Normal" style:family="paragraph">
      <style:text-properties style:font-name="Consolas" style:font-name-asian="Times New Roman" style:font-name-complex="Courier New" fo:color="#333333" fo:font-size="12pt" style:font-size-asian="12pt" style:font-size-complex="12pt" style:language-asian="fr" style:country-asian="FR"/>
    </style:style>
  </office:automatic-styles>
  <office:body>
    <office:text text:use-soft-page-breaks="true">
      <text:p text:style-name="P1">Fonctionnement de la gare<text:s/></text:p>
      <text:p text:style-name="Normal">Je vais te résumer le fonctionnement type d’une petite gare de montagne du Midi (époque vapeur/BB Midi), en prenant St‑Martin‑Lys comme modèle. Je vais m’appuyer sur des sources historiques pour vérifier quelques détails.</text:p>
      <text:p text:style-name="Normal">Une gare rurale montagnarde du Midi comme St‑Martin‑Lys, vers 1905‑1950, c’est grosso modo ça :</text:p>
      <text:p text:style-name="Normal"><text:span text:style-name="T3">Rôle principal</text:span></text:p>
      <text:list text:style-name="LFO1" text:continue-numbering="true">
        <text:list-item>
          <text:p text:style-name="P4">Point d’arrêt voyageurs pour les villages autour (quelques trains par jour, souvent des <text:span text:style-name="T5">omnibus</text:span> ou <text:span text:style-name="T6">mixtes</text:span> voyageurs + marchandises).</text:p>
        </text:list-item>
        <text:list-item>
          <text:p text:style-name="P7">Petit centre de <text:span text:style-name="T8">fret local</text:span> : bois, bétail, matériaux, produits agricoles, charbon/engrais en arrivée.</text:p>
        </text:list-item>
        <text:list-item>
          <text:p text:style-name="P9">Relais <text:span text:style-name="T10">poste / télégraphe</text:span> : le train apporte le courrier, souvent distribué ensuite par facteur à pied.</text:p>
        </text:list-item>
      </text:list>
      <text:p text:style-name="Normal"><text:span text:style-name="T11">Installations typiques</text:span></text:p>
      <text:list text:style-name="LFO2" text:continue-numbering="true">
        <text:list-item>
          <text:p text:style-name="P12">1 bâtiment voyageurs (celui de ta photo) avec :</text:p>
          <text:list text:continue-numbering="true">
            <text:list-item>
              <text:p text:style-name="P13">salle d’attente, guichet, bureau du chef de gare, parfois logement à l’étage ;</text:p>
            </text:list-item>
            <text:list-item>
              <text:p text:style-name="P14">guichet-billetterie, pesage, téléphone/ligne télégraphique.</text:p>
            </text:list-item>
          </text:list>
        </text:list-item>
        <text:list-item>
          <text:p text:style-name="P15">1 ou 2 <text:span text:style-name="T16">voies d’évitement</text:span> + une <text:span text:style-name="T17">voie de débord / quai marchandises</text:span> et parfois petite halle couverte.</text:p>
        </text:list-item>
        <text:list-item>
          <text:p text:style-name="P18">Quais bas, WC/extérieurs, lampes à pétrole ou gaz puis électriques.</text:p>
        </text:list-item>
        <text:list-item>
          <text:p text:style-name="P19">Dans les gorges : proximité d’un <text:span text:style-name="T20">tunnel</text:span>, murs de soutènement, ouvrages d’art (ponts sur l’Aude).</text:p>
        </text:list-item>
      </text:list>
      <text:p text:style-name="Normal"><text:span text:style-name="T21">Personnel (petite gare)</text:span></text:p>
      <text:list text:style-name="LFO3" text:continue-numbering="true">
        <text:list-item>
          <text:p text:style-name="P22"><text:span text:style-name="T23">Chef de gare</text:span> : fait tout ou presque – ventes billets, télégrammes, annonces, sécurité, gestion des manœuvres.</text:p>
        </text:list-item>
        <text:list-item>
          <text:p text:style-name="P24">Éventuellement un <text:span text:style-name="T25">aiguilleur / facteur mixte</text:span> qui aide aux aiguilles, aux colis, au chargement.</text:p>
        </text:list-item>
        <text:list-item>
          <text:p text:style-name="P26">Plus loin sur la ligne : <text:span text:style-name="T27">garde-barrière</text:span> pour les PN, <text:span text:style-name="T28">cantonniers</text:span> pour l’entretien de la voie.</text:p>
        </text:list-item>
      </text:list>
      <text:p text:style-name="Normal"><text:span text:style-name="T29">Fonctionnement d’une journée type</text:span></text:p>
      <text:list text:style-name="LFO4" text:continue-numbering="true">
        <text:list-item>
          <text:p text:style-name="P30">Matin :</text:p>
          <text:list text:continue-numbering="true">
            <text:list-item>
              <text:p text:style-name="P31">Réception du premier train (souvent venant de la “grande” gare de vallée) :</text:p>
              <text:list text:continue-numbering="true">
                <text:list-item>
                  <text:p text:style-name="P32">descente des voyageurs, sacs postaux, quelques colis ;</text:p>
                </text:list-item>
                <text:list-item>
                  <text:p text:style-name="P33">éventuellement 1 ou 2 wagons laissés sur la voie de débord.</text:p>
                </text:list-item>
              </text:list>
            </text:list-item>
            <text:list-item>
              <text:p text:style-name="P34">Manœuvres : le train refoule, place ou reprend les wagons, le chef de gare donne les signaux de départ.</text:p>
            </text:list-item>
          </text:list>
        </text:list-item>
        <text:list-item>
          <text:p text:style-name="P35">Journée :</text:p>
          <text:list text:continue-numbering="true">
            <text:list-item>
              <text:p text:style-name="P36"><text:span text:style-name="T37">Chargement local</text:span> : bois en wagons tombereaux, bêtes au quai si besoin, sacs de céréales/engrais, etc.</text:p>
            </text:list-item>
            <text:list-item>
              <text:p text:style-name="P38">Émission/retour de télégrammes, gestion des demandes de wagons (commande au service marchandises).</text:p>
            </text:list-item>
          </text:list>
        </text:list-item>
        <text:list-item>
          <text:p text:style-name="P39">Soir :</text:p>
          <text:list text:continue-numbering="true">
            <text:list-item>
              <text:p text:style-name="P40">Derniers voyageurs (école, marché), envoi du courrier et des wagons chargés vers la grande gare de triage.</text:p>
            </text:list-item>
          </text:list>
        </text:list-item>
      </text:list>
      <text:p text:style-name="Normal"><text:span text:style-name="T41">Particularités montagne (Midi)</text:span></text:p>
      <text:list text:style-name="LFO5" text:continue-numbering="true">
        <text:list-item>
          <text:p text:style-name="P42">Profil difficile : <text:span text:style-name="T43">rampe, courbes, tunnels</text:span> → limitations de charge des trains, renfort de freinage.</text:p>
        </text:list-item>
        <text:list-item>
          <text:p text:style-name="P44">Hiver : gestion de la neige, du gel, surveillance des chutes de pierres et glissements de terrain.</text:p>
        </text:list-item>
        <text:list-item>
          <text:p text:style-name="P45">Eau/charbon pour les locomotives vapeur souvent dans une gare plus importante, mais St‑Martin sert de <text:span text:style-name="T46">point de croisement/refuge</text:span> en cas d’incident dans les gorges.</text:p>
        </text:list-item>
      </text:list>
      <text:p text:style-name="Normal"><text:span text:style-name="T47">Évolution ensuite</text:span></text:p>
      <text:list text:style-name="LFO6" text:continue-numbering="true">
        <text:list-item>
          <text:p text:style-name="P48">Avec la route : baisse des voyageurs, recentrage sur quelques trafics lourds (comme la dolomie à St‑Martin‑Lys plus tard).</text:p>
        </text:list-item>
        <text:list-item>
          <text:p text:style-name="P49">Déclassement du service commercial classique, puis <text:span text:style-name="T50">halte touristique</text:span> (TPCF) avec fonction surtout patrimoniale et touristique.</text:p>
        </text:list-item>
      </text:list>
      <text:p text:style-name="Normal">Si tu veux, je peux te faire :</text:p>
      <text:list text:style-name="LFO7" text:continue-numbering="true">
        <text:list-item>
          <text:p text:style-name="P51">un <text:span text:style-name="T52">schéma de plan de voie type</text:span> de St‑Martin‑Lys (vue de dessus) ;</text:p>
        </text:list-item>
        <text:list-item>
          <text:p text:style-name="P53">ou une <text:span text:style-name="T54">fiche “journée type du chef de gare vers 1930”</text:span> pour mettre dans un parcours de visite.</text:p>
        </text:list-item>
      </text:list>
      <text:p text:style-name="P55"/>
      <text:p text:style-name="P56">« La gare de Saint-Martin-Lys est une petite gare rurale montagnarde de la Compagnie du Midi, située dans les gorges de la Pierre-Lys, entre Quillan et Axat. Dans les années 1930, le chef de gare y assure à lui seul l’essentiel des fonctions : accueil des voyageurs, gestion des marchandises, sécurité et communications télégraphiques. Cette fiche présente une journée type de travail à cette époque. »</text:p>
      <text:p text:style-name="Normal"><text:span text:style-name="T57">6h00 – Réveil et préparation</text:span></text:p>
      <text:list text:style-name="LFO8" text:continue-numbering="true">
        <text:list-item>
          <text:p text:style-name="P58">Lever à l’aube (logement à l’étage du bâtiment voyageurs).</text:p>
        </text:list-item>
        <text:list-item>
          <text:p text:style-name="P59">Allumage du poêle dans la salle d’attente et le bureau.</text:p>
        </text:list-item>
        <text:list-item>
          <text:p text:style-name="P60">Vérification des horloges et synchronisation avec le télégraphe.</text:p>
        </text:list-item>
        <text:list-item>
          <text:p text:style-name="P61">Préparation du registre des trains et des billets.</text:p>
        </text:list-item>
      </text:list>
      <text:p text:style-name="Normal"><text:span text:style-name="T62">6h30 – Ouverture de la gare</text:span></text:p>
      <text:list text:style-name="LFO9" text:continue-numbering="true">
        <text:list-item>
          <text:p text:style-name="P63">Allumage des lampes (pétrole ou électricité selon époque).</text:p>
        </text:list-item>
        <text:list-item>
          <text:p text:style-name="P64">Nettoyage rapide des quais et de la salle d’attente.</text:p>
        </text:list-item>
        <text:list-item>
          <text:p text:style-name="P65">Inspection visuelle des voies : obstacles, pierres, neige, coulées de boue.</text:p>
        </text:list-item>
        <text:list-item>
          <text:p text:style-name="P66">Premier contact télégraphique avec Quillan/Axat pour confirmer le service.</text:p>
        </text:list-item>
      </text:list>
      <text:p text:style-name="Normal"><text:span text:style-name="T67">7h15 – Arrivée du premier train (omnibus)</text:span></text:p>
      <text:list text:style-name="LFO10" text:continue-numbering="true">
        <text:list-item>
          <text:p text:style-name="P68">Annonce du train (sifflet, drapeau).</text:p>
        </text:list-item>
        <text:list-item>
          <text:p text:style-name="P69">Accueil des voyageurs, vente de billets, bagages.</text:p>
        </text:list-item>
        <text:list-item>
          <text:p text:style-name="P70">Réception des sacs postaux, remise au facteur.</text:p>
        </text:list-item>
        <text:list-item>
          <text:p text:style-name="P71">Déchargement/chargement de quelques colis.</text:p>
        </text:list-item>
        <text:list-item>
          <text:p text:style-name="P72">Manœuvres éventuelles : wagons laissés ou repris sur la voie de débord.</text:p>
        </text:list-item>
        <text:list-item>
          <text:p text:style-name="P73">Télégramme à la gare voisine pour signaler le départ.</text:p>
        </text:list-item>
      </text:list>
      <text:p text:style-name="Normal"><text:span text:style-name="T74">8h00–12h00 – Activité fret et services locaux</text:span></text:p>
      <text:list text:style-name="LFO11" text:continue-numbering="true">
        <text:list-item>
          <text:p text:style-name="P75">Accueil des agriculteurs et artisans pour les expéditions : bois, bétail, sacs de céréales, engrais, matériaux.</text:p>
        </text:list-item>
        <text:list-item>
          <text:p text:style-name="P76">Pesage des marchandises et remplissage des lettres de voiture.</text:p>
        </text:list-item>
        <text:list-item>
          <text:p text:style-name="P77">Demande de wagons supplémentaires par télégraphe si besoin.</text:p>
        </text:list-item>
        <text:list-item>
          <text:p text:style-name="P78">Surveillance du passage à niveau et des manœuvres.</text:p>
        </text:list-item>
        <text:list-item>
          <text:p text:style-name="P79">Entretien de base : nettoyage des voies, petite maintenance.</text:p>
        </text:list-item>
      </text:list>
      <text:p text:style-name="Normal"><text:span text:style-name="T80">12h00–13h30 – Pause de milieu de journée</text:span></text:p>
      <text:list text:style-name="LFO12" text:continue-numbering="true">
        <text:list-item>
          <text:p text:style-name="P81">Repas pris au logement ou dans la petite cuisine du bâtiment.</text:p>
        </text:list-item>
        <text:list-item>
          <text:p text:style-name="P82">Surveillance minimale de la gare (portes fermées, télégraphe surveillé).</text:p>
        </text:list-item>
        <text:list-item>
          <text:p text:style-name="P83">Vérification rapide des installations avant la reprise.</text:p>
        </text:list-item>
      </text:list>
      <text:p text:style-name="Normal"><text:span text:style-name="T84">13h30 – Train de l’après-midi (mixte voyageurs/fret)</text:span></text:p>
      <text:list text:style-name="LFO13" text:continue-numbering="true">
        <text:list-item>
          <text:p text:style-name="P85">Accueil des voyageurs (retour du marché, déplacements administratifs).</text:p>
        </text:list-item>
        <text:list-item>
          <text:p text:style-name="P86">Expédition des wagons préparés le matin : bois, bétail, colis.</text:p>
        </text:list-item>
        <text:list-item>
          <text:p text:style-name="P87">Réception de nouveaux colis et courrier.</text:p>
        </text:list-item>
        <text:list-item>
          <text:p text:style-name="P88">Manœuvres de réorganisation du train si nécessaire.</text:p>
        </text:list-item>
      </text:list>
      <text:p text:style-name="Normal"><text:span text:style-name="T89">14h30–18h00 – Clôture progressive des activités</text:span></text:p>
      <text:list text:style-name="LFO14" text:continue-numbering="true">
        <text:list-item>
          <text:p text:style-name="P90">Rangement des registres de fret et de circulation.</text:p>
        </text:list-item>
        <text:list-item>
          <text:p text:style-name="P91">Préparation des demandes pour le lendemain (wagons, matériel, courrier).</text:p>
        </text:list-item>
        <text:list-item>
          <text:p text:style-name="P92">Échanges télégraphiques de fin de journée avec Quillan.</text:p>
        </text:list-item>
        <text:list-item>
          <text:p text:style-name="P93">Entretien des locaux (balayage, rangement, petites réparations).</text:p>
        </text:list-item>
      </text:list>
      <text:p text:style-name="Normal"><text:span text:style-name="T94">18h30 – Dernier train de la journée</text:span></text:p>
      <text:list text:style-name="LFO15" text:continue-numbering="true">
        <text:list-item>
          <text:p text:style-name="P95">Derniers voyageurs (ouvriers, écoliers, familles).</text:p>
        </text:list-item>
        <text:list-item>
          <text:p text:style-name="P96">Réception finale du courrier, des journaux, des colis urgents.</text:p>
        </text:list-item>
        <text:list-item>
          <text:p text:style-name="P97">Vérification de la bonne fermeture des wagons, signal de départ.</text:p>
        </text:list-item>
      </text:list>
      <text:p text:style-name="Normal"><text:span text:style-name="T98">19h30–20h00 – Fin de service</text:span></text:p>
      <text:list text:style-name="LFO16" text:continue-numbering="true">
        <text:list-item>
          <text:p text:style-name="P99">Rédaction des rapports journaliers (trafic, incidents, météo).</text:p>
        </text:list-item>
        <text:list-item>
          <text:p text:style-name="P100">Extinction des éclairages, fermeture des locaux.</text:p>
        </text:list-item>
        <text:list-item>
          <text:p text:style-name="P101">Inspection rapide des voies aux abords de la gare.</text:p>
        </text:list-item>
        <text:list-item>
          <text:p text:style-name="P102">Fin de journée, retour au logement.</text:p>
        </text:list-item>
      </text:list>
      <text:p text:style-name="P103"/>
      <text:p text:style-name="Normal"><text:span text:style-name="T104">Les outils du chef de gare</text:span></text:p>
      <text:p text:style-name="Normal"><text:span text:style-name="T105">Mets cette partie en </text:span><text:span text:style-name="T106">tableau 2 colonnes</text:span><text:span text:style-name="T107">.</text:span></text:p>
      <text:list text:style-name="LFO17" text:continue-numbering="true">
        <text:list-item>
          <text:p text:style-name="P108">Télégraphe / téléphone : communication avec les gares voisines, avis de départ et d’arrivée des trains.</text:p>
        </text:list-item>
        <text:list-item>
          <text:p text:style-name="P109">Registres de circulation : heures de passage, retards, incidents.</text:p>
        </text:list-item>
        <text:list-item>
          <text:p text:style-name="P110">Carnets de billets et composteur : vente et contrôle des titres de transport.</text:p>
        </text:list-item>
        <text:list-item>
          <text:p text:style-name="P111">Lettres de voiture et registres de fret : suivi des marchandises expédiées/reçues.</text:p>
        </text:list-item>
        <text:list-item>
          <text:p text:style-name="P112">Bascule de pesage (si présente) : pesée des colis et des wagons.</text:p>
        </text:list-item>
        <text:list-item>
          <text:p text:style-name="P113">Drapeaux (rouge/vert) et sifflet : signaux manuels de sécurité.</text:p>
        </text:list-item>
        <text:list-item>
          <text:p text:style-name="P114">Lampes (pétrole/électriques) : éclairage des quais et du BV.</text:p>
        </text:list-item>
        <text:list-item>
          <text:p text:style-name="P115">Outils de voie (clé d’aiguille, pelle, balai) : entretien courant autour de la gare.</text:p>
        </text:list-item>
        <text:list-item>
          <text:p text:style-name="P116">Uniforme de service : vareuse, casquette, insigne de la Compagnie du Midi.</text:p>
        </text:list-item>
      </text:list>
      <text:p text:style-name="P117"/>
      <text:p text:style-name="Normal"><text:span text:style-name="T118">Particularités d’une petite gare montagnarde</text:span></text:p>
      <text:p text:style-name="P119">Sous forme de puces, éventuellement encadré en couleur.</text:p>
      <text:list text:style-name="LFO18" text:continue-numbering="true">
        <text:list-item>
          <text:p text:style-name="P120">Ligne à profil difficile : rampes, courbes serrées, tunnels → charges limitées, vigilance accrue.</text:p>
        </text:list-item>
        <text:list-item>
          <text:p text:style-name="P121">Risques naturels : chutes de pierres, crues rapides de l’Aude, neige et verglas l’hiver.</text:p>
        </text:list-item>
        <text:list-item>
          <text:p text:style-name="P122">Isolement relatif : peu de personnel, le chef de gare est souvent de permanence en cas de blocage.</text:p>
        </text:list-item>
        <text:list-item>
          <text:p text:style-name="P123">Rôle social : point de passage obligé pour le courrier, les journaux, les marchandises et les voyageurs.</text:p>
        </text:list-item>
        <text:list-item>
          <text:p text:style-name="P124">Adaptation saisonnière : trafic plus important aux périodes de marchés, transhumance, fêtes locales.</text:p>
        </text:list-item>
      </text:list>
      <text:p text:style-name="P125">« Dans une petite gare du Midi comme Saint-Martin-Lys, le chef de gare est à la fois agent commercial, chef d’exploitation, opérateur télégraphe, manutentionnaire et parfois même cantonnier. Sa journée suit le rythme des trains, mais aussi des saisons et de la vie du village. »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margin-bottom="0in"/>
      <style:text-properties style:font-name="Aptos" style:font-name-asian="Aptos" style:font-name-complex="Aptos" fo:color="#008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in" fo:padding-bottom="0.20833in" fo:padding-left="0.27778in" fo:padding-right="0in" fo:background-color="transparent" draw:textarea-vertical-align="bottom" draw:textarea-horizontal-align="left" style:wrap="run-through" style:run-through="foreground" style:horizontal-rel="page" style:vertical-rel="page" style:horizontal-pos="left" style:vertical-pos="bottom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Pieddepage"><draw:frame draw:z-index="251660288" draw:id="id0" draw:style-name="a0" draw:name="Zone de texte 3" text:anchor-type="paragraph" svg:x="0in" svg:y="0in" svg:width="0.70486in" svg:height="0.39097in" style:rel-width="scale" style:rel-height="scale"><draw:text-box><text:p text:style-name="P2">Interne</text:p></draw:text-box><svg:title/><svg:desc>Intern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URAGEAUX Guillaume (SNCF VOYAGEURS / DIRECTION INTERCITES / DIRECTION B2B)</meta:initial-creator>
    <dc:creator>POURAGEAUX Guillaume (SNCF VOYAGEURS / DIRECTION INTERCITES / DIRECTION B2B)</dc:creator>
    <meta:creation-date>2026-05-15T16:41:00Z</meta:creation-date>
    <dc:date>2026-05-15T16:55:00Z</dc:date>
    <meta:template xlink:href="Normal.dotm" xlink:type="simple"/>
    <meta:editing-cycles>2</meta:editing-cycles>
    <meta:editing-duration>PT840S</meta:editing-duration>
    <meta:user-defined meta:name="ClassificationContentMarkingFooterShapeIds">2b1b44d8,21c4df35,74a38ce6</meta:user-defined>
    <meta:user-defined meta:name="ClassificationContentMarkingFooterFontProps">#008000,10,Aptos</meta:user-defined>
    <meta:user-defined meta:name="ClassificationContentMarkingFooterText">Interne</meta:user-defined>
    <meta:user-defined meta:name="MSIP_Label_c8d3f7c8-5c4b-4ab6-9486-a0a9eb08efa7_Enabled">true</meta:user-defined>
    <meta:user-defined meta:name="MSIP_Label_c8d3f7c8-5c4b-4ab6-9486-a0a9eb08efa7_SetDate">2026-05-15T16:51:31Z</meta:user-defined>
    <meta:user-defined meta:name="MSIP_Label_c8d3f7c8-5c4b-4ab6-9486-a0a9eb08efa7_Method">Standard</meta:user-defined>
    <meta:user-defined meta:name="MSIP_Label_c8d3f7c8-5c4b-4ab6-9486-a0a9eb08efa7_Name">Interne - Groupe</meta:user-defined>
    <meta:user-defined meta:name="MSIP_Label_c8d3f7c8-5c4b-4ab6-9486-a0a9eb08efa7_SiteId">4a7c8238-5799-4b16-9fc6-9ad8fce5a7d9</meta:user-defined>
    <meta:user-defined meta:name="MSIP_Label_c8d3f7c8-5c4b-4ab6-9486-a0a9eb08efa7_ActionId">6bd63ade-fd1d-45b8-b23b-37bd49000a8a</meta:user-defined>
    <meta:user-defined meta:name="MSIP_Label_c8d3f7c8-5c4b-4ab6-9486-a0a9eb08efa7_ContentBits">2</meta:user-defined>
    <meta:user-defined meta:name="MSIP_Label_c8d3f7c8-5c4b-4ab6-9486-a0a9eb08efa7_Tag">10, 3, 0, 1</meta:user-defined>
    <meta:document-statistic meta:page-count="5" meta:paragraph-count="15" meta:word-count="1165" meta:character-count="7562" meta:row-count="53" meta:non-whitespace-character-count="6412"/>
  </office:meta>
</office:document-meta>
</file>